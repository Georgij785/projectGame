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A0000003639E41792.png" manifest:media-type="image/png"/>
  <manifest:file-entry manifest:full-path="Pictures/100000010000018B000000313B8011B2.png" manifest:media-type="image/png"/>
  <manifest:file-entry manifest:full-path="Pictures/100000010000011F0000003EDD89ADBB.png" manifest:media-type="image/png"/>
  <manifest:file-entry manifest:full-path="Pictures/100000010000014F000000267A09DED9.png" manifest:media-type="image/png"/>
  <manifest:file-entry manifest:full-path="Pictures/10000001000002BC0000002A348F4ECD.png" manifest:media-type="image/png"/>
  <manifest:file-entry manifest:full-path="Pictures/10000001000002C6000000EA2C393199.png" manifest:media-type="image/png"/>
  <manifest:file-entry manifest:full-path="Pictures/10000001000005500000028DDBBFFD5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Обычный-title">
      <style:graphic-properties fo:min-height="2.629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Обычный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Пятибратов <text:s/>Георгий 10-2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Геометрическая задача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Задача<text:line-break/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Реализовать визуализацию разности двух множеств прямоугольников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Что использовалось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Код написан полностью на java, с использованием библиотеки Area для более оптимизорованного расчёта разности и площадей</text:p>
              </text:list-item>
            </text:list>
          </draw:text-box>
        </draw:frame>
        <draw:frame draw:style-name="gr2" draw:text-style-name="P2" draw:layer="layout" svg:width="20.863cm" svg:height="2.363cm" svg:x="2.5cm" svg:y="9.637cm">
          <draw:image xlink:href="Pictures/100000010000014F000000267A09DE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Интерфейс, добавление вручную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У меня есть возможность добавлять численно(может пригодиться для расчета на местности)</text:p>
              </text:list-item>
              <text:list-item>
                <text:p>Пишем координаты и выбираем в какое множество добавить</text:p>
              </text:list-item>
            </text:list>
          </draw:text-box>
        </draw:frame>
        <draw:frame draw:style-name="gr2" draw:text-style-name="P2" draw:layer="layout" svg:width="27cm" svg:height="1.618cm" svg:x="0.5cm" svg:y="13.5cm">
          <draw:image xlink:href="Pictures/10000001000002BC0000002A348F4E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Добавление мышью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Использую простой переключатель для того чтобы выбрать в какое множество будет добавляться нарисованный прямоугольник</text:p>
              </text:list-item>
            </text:list>
          </draw:text-box>
        </draw:frame>
        <draw:frame draw:style-name="gr2" draw:text-style-name="P2" draw:layer="layout" svg:width="15.974cm" svg:height="3.448cm" svg:x="6cm" svg:y="11.552cm">
          <draw:image xlink:href="Pictures/100000010000011F0000003EDD89ADB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опции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И возможность очищать множества </text:p>
              </text:list-item>
            </text:list>
          </draw:text-box>
        </draw:frame>
        <draw:frame draw:style-name="gr2" draw:text-style-name="P2" draw:layer="layout" svg:width="22.403cm" svg:height="2.776cm" svg:x="2.5cm" svg:y="6.724cm">
          <draw:image xlink:href="Pictures/100000010000018B000000313B8011B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классы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Я использую один класс для всей программы и в нём реализованы все методы нужные для работы</text:p>
              </text:list-item>
              <text:list-item>
                <text:p>Он наследуется от класса Jpanel, для того чтобы была у меня возможность управлять окнами</text:p>
              </text:list-item>
            </text:list>
          </draw:text-box>
        </draw:frame>
        <draw:frame draw:style-name="gr2" draw:text-style-name="P2" draw:layer="layout" svg:width="24.856cm" svg:height="2.927cm" svg:x="1.4cm" svg:y="12.073cm">
          <draw:image xlink:href="Pictures/10000001000001CA0000003639E417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методы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Создание прямоугольников</text:p>
              </text:list-item>
              <text:list-item>
                <text:p>Отслеживание положения мыши</text:p>
              </text:list-item>
              <text:list-item>
                <text:p>Отрисовка</text:p>
              </text:list-item>
              <text:list-item>
                <text:p>Дополнительные методы для проверок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Запуск программы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Настраиваем положение окна и включаем его</text:p>
              </text:list-item>
            </text:list>
          </draw:text-box>
        </draw:frame>
        <draw:frame draw:style-name="gr2" draw:text-style-name="P2" draw:layer="layout" svg:width="18.787cm" svg:height="6.191cm" svg:x="3.213cm" svg:y="8.809cm">
          <draw:image xlink:href="Pictures/10000001000002C6000000EA2C39319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демонстрация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4cm" svg:height="11.522cm" svg:x="1.5cm" svg:y="3.478cm">
          <draw:image xlink:href="Pictures/10000001000005500000028DDBBFFD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5-03T20:34:18.173000000</meta:creation-date>
    <dc:date>2026-05-03T20:51:52.625000000</dc:date>
    <meta:editing-duration>PT17M36S</meta:editing-duration>
    <meta:editing-cycles>1</meta:editing-cycles>
    <meta:document-statistic meta:object-count="68"/>
    <meta:generator>PPT_Plus/1.0.0.0$Windows_X86_64 LibreOffice_project/</meta:generator>
  </office:meta>
</office:document-meta>
</file>